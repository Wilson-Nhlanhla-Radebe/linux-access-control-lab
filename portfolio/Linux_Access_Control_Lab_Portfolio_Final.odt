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600000300AD613A4F.png" manifest:media-type="image/png"/>
  <manifest:file-entry manifest:full-path="Pictures/100000010000055600000300DE535A3D.png" manifest:media-type="image/png"/>
  <manifest:file-entry manifest:full-path="Pictures/10000001000005560000030062F53A35.png" manifest:media-type="image/png"/>
  <manifest:file-entry manifest:full-path="Pictures/1000000100000556000003000B251624.png" manifest:media-type="image/png"/>
  <manifest:file-entry manifest:full-path="Pictures/100000010000055600000300104289A5.png" manifest:media-type="image/png"/>
  <manifest:file-entry manifest:full-path="Pictures/100000010000055600000300412A6B87.png" manifest:media-type="image/png"/>
  <manifest:file-entry manifest:full-path="Pictures/100000010000055600000300EF8360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in" fo:margin-top="0in" fo:margin-bottom="0in" table:align="center" style:writing-mode="lr-tb"/>
    </style:style>
    <style:style style:name="Table1.A" style:family="table-column">
      <style:table-column-properties style:column-width="3.5in"/>
    </style:style>
    <style:style style:name="Table1.1" style:family="table-row">
      <style:table-row-properties fo:keep-together="auto"/>
    </style:style>
    <style:style style:name="Table1.A1" style:family="table-cell">
      <style:table-cell-properties fo:background-color="#eaeaea" fo:padding-left="0.0694in" fo:padding-right="0.0694in" fo:padding-top="0.0556in" fo:padding-bottom="0.0556in" fo:border="0.5pt solid #000000" style:writing-mode="lr-tb">
        <style:background-image/>
      </style:table-cell-properties>
    </style:style>
    <style:style style:name="Table1.B1" style:family="table-cell">
      <style:table-cell-properties fo:padding-left="0.0694in" fo:padding-right="0.0694in" fo:padding-top="0.0556in" fo:padding-bottom="0.0556in" fo:border="0.5pt solid #000000" style:writing-mode="lr-tb"/>
    </style:style>
    <style:style style:name="Table1.B2" style:family="table-cell">
      <style:table-cell-properties fo:padding-left="0.0694in" fo:padding-right="0.0694in" fo:padding-top="0.0556in" fo:padding-bottom="0.0556in" fo:border="0.5pt solid #000000" style:writing-mode="lr-tb"/>
    </style:style>
    <style:style style:name="Table1.B3" style:family="table-cell">
      <style:table-cell-properties fo:padding-left="0.0694in" fo:padding-right="0.0694in" fo:padding-top="0.0556in" fo:padding-bottom="0.0556in" fo:border="0.5pt solid #000000" style:writing-mode="lr-tb"/>
    </style:style>
    <style:style style:name="Table1.B4" style:family="table-cell">
      <style:table-cell-properties fo:padding-left="0.0694in" fo:padding-right="0.0694in" fo:padding-top="0.0556in" fo:padding-bottom="0.0556in" fo:border="0.5pt solid #000000" style:writing-mode="lr-tb"/>
    </style:style>
    <style:style style:name="Table2" style:family="table">
      <style:table-properties style:width="7in" fo:margin-top="0in" fo:margin-bottom="0in" table:align="center" style:writing-mode="lr-tb"/>
    </style:style>
    <style:style style:name="Table2.A" style:family="table-column">
      <style:table-column-properties style:column-width="3.5in"/>
    </style:style>
    <style:style style:name="Table2.1" style:family="table-row">
      <style:table-row-properties fo:keep-together="auto"/>
    </style:style>
    <style:style style:name="Table2.A1" style:family="table-cell">
      <style:table-cell-properties fo:background-color="#d9e2f3" fo:padding-left="0.0694in" fo:padding-right="0.0694in" fo:padding-top="0.0556in" fo:padding-bottom="0.0556in" fo:border="0.5pt solid #000000" style:writing-mode="lr-tb">
        <style:background-image/>
      </style:table-cell-properties>
    </style:style>
    <style:style style:name="Table2.A2" style:family="table-cell">
      <style:table-cell-properties style:vertical-align="middle" fo:padding-left="0.0694in" fo:padding-right="0.0694in" fo:padding-top="0.0556in" fo:padding-bottom="0.0556in"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in" style:contextual-spacing="false" fo:line-height="100%" fo:text-align="start" style:justify-single-word="false" fo:orphans="2" fo:widows="2"/>
      <style:text-properties fo:language="en" fo:country="US" style:letter-kerning="false" style:font-name-asian="ＭＳ 明朝" style:language-asian="en" style:country-asian="US" style:font-size-complex="11pt" style:language-complex="ar" style:country-complex="SA"/>
    </style:style>
    <style:style style:name="P4" style:family="paragraph" style:parent-style-name="Heading_20_1">
      <style:paragraph-properties fo:margin-top="0in" fo:margin-bottom="0.0417in" style:contextual-spacing="false" fo:break-before="page"/>
    </style:style>
    <style:style style:name="P5" style:family="paragraph" style:parent-style-name="Heading_20_1">
      <style:paragraph-properties fo:margin-top="0.0835in" fo:margin-bottom="0.0417in" style:contextual-spacing="false"/>
    </style:style>
    <style:style style:name="P6" style:family="paragraph" style:parent-style-name="Heading_20_2">
      <style:paragraph-properties fo:margin-top="0.0835in" fo:margin-bottom="0.0417in" style:contextual-spacing="false"/>
    </style:style>
    <style:style style:name="P7" style:family="paragraph" style:parent-style-name="Standard">
      <style:paragraph-properties fo:text-align="center" style:justify-single-word="false"/>
      <style:text-properties style:font-name="Aptos" fo:font-size="26pt" fo:font-style="normal" fo:font-weight="bold" style:font-size-asian="26pt" style:font-style-asian="normal" style:font-weight-asian="bold"/>
    </style:style>
    <style:style style:name="P8" style:family="paragraph" style:parent-style-name="Standard">
      <style:paragraph-properties fo:text-align="center" style:justify-single-word="false"/>
      <style:text-properties style:font-name="Aptos" fo:font-size="12.5pt" fo:font-style="italic" fo:font-weight="normal" style:font-size-asian="12.5pt" style:font-style-asian="italic" style:font-weight-asian="normal"/>
    </style:style>
    <style:style style:name="P9" style:family="paragraph" style:parent-style-name="Standard">
      <style:paragraph-properties fo:margin-top="0in" fo:margin-bottom="0in" style:contextual-spacing="false" fo:line-height="100%" fo:text-align="start" style:justify-single-word="false" fo:orphans="2" fo:widows="2"/>
      <style:text-properties style:font-name="Aptos" fo:font-size="10pt" fo:language="en" fo:country="US" fo:font-weight="bold" style:letter-kerning="false" style:font-name-asian="ＭＳ 明朝" style:font-size-asian="10pt" style:language-asian="en" style:country-asian="US" style:font-weight-asian="bold" style:font-size-complex="11pt" style:language-complex="ar" style:country-complex="SA"/>
    </style:style>
    <style:style style:name="P10" style:family="paragraph" style:parent-style-name="Standard">
      <style:paragraph-properties fo:margin-top="0in" fo:margin-bottom="0in" style:contextual-spacing="false" fo:line-height="100%" fo:text-align="start" style:justify-single-word="false" fo:orphans="2" fo:widows="2"/>
      <style:text-properties style:font-name="Aptos" fo:font-size="10pt" fo:language="en" fo:country="US" style:letter-kerning="false" style:font-name-asian="ＭＳ 明朝" style:font-size-asian="10pt" style:language-asian="en" style:country-asian="US" style:font-size-complex="11pt" style:language-complex="ar" style:country-complex="SA"/>
    </style:style>
    <style:style style:name="P11" style:family="paragraph" style:parent-style-name="Standard">
      <style:paragraph-properties fo:text-align="center" style:justify-single-word="false"/>
      <style:text-properties style:font-name="Aptos" fo:font-size="10.5pt" fo:font-style="normal" fo:font-weight="normal" style:font-size-asian="10.5pt" style:font-style-asian="normal" style:font-weight-asian="normal"/>
    </style:style>
    <style:style style:name="P12" style:family="paragraph" style:parent-style-name="Standard">
      <style:paragraph-properties fo:margin-top="0in" fo:margin-bottom="0.0835in" style:contextual-spacing="false"/>
      <style:text-properties style:font-name="Aptos" fo:font-size="10.5pt" style:font-size-asian="10.5pt"/>
    </style:style>
    <style:style style:name="P13" style:family="paragraph" style:parent-style-name="Standard">
      <style:paragraph-properties fo:margin-top="0in" fo:margin-bottom="0.0555in" style:contextual-spacing="false"/>
      <style:text-properties style:font-name="Aptos" fo:font-size="11pt" fo:font-weight="bold" style:font-size-asian="11pt" style:font-weight-asian="bold"/>
    </style:style>
    <style:style style:name="P14" style:family="paragraph" style:parent-style-name="Standard">
      <style:paragraph-properties fo:margin-top="0in" fo:margin-bottom="0.0555in" style:contextual-spacing="false" fo:break-before="page"/>
      <style:text-properties style:font-name="Aptos" fo:font-size="11pt" fo:font-weight="bold" style:font-size-asian="11pt" style:font-weight-asian="bold"/>
    </style:style>
    <style:style style:name="P15" style:family="paragraph" style:parent-style-name="Standard">
      <style:paragraph-properties fo:margin-left="0.2in" fo:margin-top="0in" fo:margin-bottom="0.028in" style:contextual-spacing="false"/>
      <style:text-properties fo:font-size="10.5pt" style:font-size-asian="10.5pt"/>
    </style:style>
    <style:style style:name="P16" style:family="paragraph" style:parent-style-name="Standard">
      <style:paragraph-properties fo:margin-top="0in" fo:margin-bottom="0.0835in" style:contextual-spacing="false" fo:text-align="center" style:justify-single-word="false"/>
      <style:text-properties fo:font-size="9pt" fo:font-style="italic" style:font-size-asian="9pt" style:font-style-asian="italic"/>
    </style:style>
    <style:style style:name="P17" style:family="paragraph" style:parent-style-name="Standard">
      <style:paragraph-properties fo:margin-top="0in" fo:margin-bottom="0.0835in" style:contextual-spacing="false"/>
    </style:style>
    <style:style style:name="T1" style:family="text">
      <style:text-properties style:font-name="Aptos" fo:font-size="9pt" style:font-size-asian="9pt"/>
    </style:style>
    <style:style style:name="T2" style:family="text">
      <style:text-properties style:font-name="Aptos" fo:font-size="10.5pt" style:font-size-asian="10.5pt"/>
    </style:style>
    <style:style style:name="T3" style:family="text">
      <style:text-properties style:font-name="Aptos" fo:font-size="10.5pt" fo:font-weight="bold" style:font-size-asian="10.5pt" style:font-weight-asian="bold" style:font-weight-complex="bold"/>
    </style:style>
    <style:style style:name="T4" style:family="text">
      <style:text-properties fo:font-size="10.5pt" style:text-underline-style="solid" style:text-underline-width="auto" style:text-underline-color="font-color" style:font-size-asian="10.5pt"/>
    </style:style>
    <style:style style:name="T5" style:family="text">
      <style:text-properties officeooo:rsid="001510af"/>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officeooo:rsid="0015cc8d"/>
    </style:style>
    <style:style style:name="T12" style:family="text">
      <style:text-properties fo:font-style="normal" style:font-style-asian="normal" style:font-style-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style:text-underline-style="none" style:font-style-asian="normal" style:font-style-complex="normal"/>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inux Access Control Lab Portfolio</text:p>
      <text:p text:style-name="P8">User, Group, Permission, and ACL Administration on Linux</text:p>
      <text:p text:style-name="Standard"/>
      <table:table table:name="Table1" table:style-name="Table1">
        <table:table-column table:style-name="Table1.A" table:number-columns-repeated="2"/>
        <table:table-row table:style-name="Table1.1">
          <table:table-cell table:style-name="Table1.A1" office:value-type="string">
            <text:p text:style-name="P9">Prepared by</text:p>
          </table:table-cell>
          <table:table-cell table:style-name="Table1.B1" office:value-type="string">
            <text:p text:style-name="P10">Wi<text:span text:style-name="T5">lson Nhlanhla Radebe</text:span></text:p>
          </table:table-cell>
        </table:table-row>
        <table:table-row table:style-name="Table1.1">
          <table:table-cell table:style-name="Table1.A1" office:value-type="string">
            <text:p text:style-name="P9">Project type</text:p>
          </table:table-cell>
          <table:table-cell table:style-name="Table1.B2" office:value-type="string">
            <text:p text:style-name="P10">Linux <text:span text:style-name="T5">S</text:span>ystem <text:span text:style-name="T5">A</text:span>dministration lab</text:p>
          </table:table-cell>
        </table:table-row>
        <table:table-row table:style-name="Table1.1">
          <table:table-cell table:style-name="Table1.A1" office:value-type="string">
            <text:p text:style-name="P9">Repository use</text:p>
          </table:table-cell>
          <table:table-cell table:style-name="Table1.B3" office:value-type="string">
            <text:p text:style-name="P10">GitHub <text:span text:style-name="T5">P</text:span>ortfolio</text:p>
          </table:table-cell>
        </table:table-row>
        <table:table-row table:style-name="Table1.1">
          <table:table-cell table:style-name="Table1.A1" office:value-type="string">
            <text:p text:style-name="P9">Status</text:p>
          </table:table-cell>
          <table:table-cell table:style-name="Table1.B4" office:value-type="string">
            <text:p text:style-name="P10">Final <text:span text:style-name="T11">P</text:span>ortfolio</text:p>
          </table:table-cell>
        </table:table-row>
      </table:table>
      <text:p text:style-name="Standard"/>
      <text:p text:style-name="P11">Prepared for a public GitHub repository and interview review.</text:p>
      <text:p text:style-name="Standard"/>
      <text:h text:style-name="P4" text:outline-level="1">1. Executive Summary</text:h>
      <text:p text:style-name="P12">This lab demonstrates practical Linux access control in a multi-user environment. The work covers account creation, group management, directory ownership, permission hardening, ACL-based traversal access, and final access validation. The outcome is a clean departmental structure where security staff and finance staff can reach only the directories intended for them.</text:p>
      <text:h text:style-name="P5" text:outline-level="1">2. Lab Objectives</text:h>
      <text:p text:style-name="P15">• Create standard user accounts for separate access paths.</text:p>
      <text:p text:style-name="P15">• Create dedicated groups for security and finance operations.</text:p>
      <text:p text:style-name="P15">• Build a shared /srv directory with departmental subdirectories.</text:p>
      <text:p text:style-name="P15">• Apply ownership and permissions to restrict unauthorized access.</text:p>
      <text:p text:style-name="P15">• Use setgid so new content inherits the correct group context.</text:p>
      <text:p text:style-name="P15">• Grant minimal ACL access for traversal where needed.</text:p>
      <text:p text:style-name="P15">• Verify the final configuration by testing access as different users.</text:p>
      <text:h text:style-name="P5" text:outline-level="1">3. Environment and Tools</text:h>
      <table:table table:name="Table2" table:style-name="Table2">
        <table:table-column table:style-name="Table2.A" table:number-columns-repeated="2"/>
        <table:table-header-rows>
          <table:table-row table:style-name="Table2.1">
            <table:table-cell table:style-name="Table2.A1" office:value-type="string">
              <text:p text:style-name="P9">Category</text:p>
            </table:table-cell>
            <table:table-cell table:style-name="Table2.A1" office:value-type="string">
              <text:p text:style-name="P9">Details</text:p>
            </table:table-cell>
          </table:table-row>
        </table:table-header-rows>
        <table:table-row table:style-name="Table2.1">
          <table:table-cell table:style-name="Table2.A2" office:value-type="string">
            <text:p text:style-name="P3">Operating system</text:p>
          </table:table-cell>
          <table:table-cell table:style-name="Table2.A2" office:value-type="string">
            <text:p text:style-name="P3">Linux desktop environment</text:p>
          </table:table-cell>
        </table:table-row>
        <table:table-row table:style-name="Table2.1">
          <table:table-cell table:style-name="Table2.A2" office:value-type="string">
            <text:p text:style-name="P3">Shell</text:p>
          </table:table-cell>
          <table:table-cell table:style-name="Table2.A2" office:value-type="string">
            <text:p text:style-name="P3">bash</text:p>
          </table:table-cell>
        </table:table-row>
        <table:table-row table:style-name="Table2.1">
          <table:table-cell table:style-name="Table2.A2" office:value-type="string">
            <text:p text:style-name="P3">Utilities used</text:p>
          </table:table-cell>
          <table:table-cell table:style-name="Table2.A2" office:value-type="string">
            <text:p text:style-name="P3">adduser, addgroup, usermod, mkdir, touch, chown, chmod, setfacl, getfacl, su, ls</text:p>
          </table:table-cell>
        </table:table-row>
        <table:table-row table:style-name="Table2.1">
          <table:table-cell table:style-name="Table2.A2" office:value-type="string">
            <text:p text:style-name="P3">Working path</text:p>
          </table:table-cell>
          <table:table-cell table:style-name="Table2.A2" office:value-type="string">
            <text:p text:style-name="P3">/home/willyonazure/srv</text:p>
          </table:table-cell>
        </table:table-row>
      </table:table>
      <text:h text:style-name="P5" text:outline-level="1">4. Implementation Summary</text:h>
      <text:h text:style-name="P6" text:outline-level="2">4.1 User creation</text:h>
      <text:p text:style-name="P12">The first step was creating the user account john with <text:span text:style-name="T12">adduser</text:span>. The account was initialized with a home directory, password, and standard user metadata. A second account, jane, was then created using the same process so the finance side of the lab could be tested independently.</text:p>
      <text:h text:style-name="P6" text:outline-level="2">4.2 Directory structure</text:h>
      <text:p text:style-name="P12">A working directory named <text:span text:style-name="T8">srv</text:span> was created under the main account home path. Two departmental subdirectories were then created inside it: <text:span text:style-name="T8">security_directory</text:span> and <text:span text:style-name="T8">finance_directory</text:span>. Test files were created in each folder to represent controlled departmental content.</text:p>
      <text:h text:style-name="P6" text:outline-level="2">4.3 Groups, ownership, and permissions</text:h>
      <text:p text:style-name="P12">Two groups were created to separate access: <text:span text:style-name="T8">security_group</text:span> and <text:span text:style-name="T8">finance_group</text:span>. The directories were assigned to root with the matching departmental group. Permissions were tightened so that only the owner and the correct group could access the directories. The <text:span text:style-name="T14">setgid </text:span>bit was also applied to preserve group inheritance for new content.</text:p>
      <text:h text:style-name="P6" text:outline-level="2"><text:soft-page-break/>4.4 ACL traversal access</text:h>
      <text:p text:style-name="P12">ACL entries were added to the parent home directory so <text:span text:style-name="T8">john</text:span> and <text:span text:style-name="T8">jane</text:span> could traverse into the lab environment without exposing broader access than necessary. This is the right model: grant only the minimum access required for the task.</text:p>
      <text:h text:style-name="P6" text:outline-level="2">4.5 Validation</text:h>
      <text:p text:style-name="P17"><text:span text:style-name="T2">The last stage tested access from </text:span><text:span text:style-name="T3">root</text:span><text:span text:style-name="T2">, </text:span><text:span text:style-name="T3">john</text:span><text:span text:style-name="T2">, and </text:span><text:span text:style-name="T3">jane</text:span><text:span text:style-name="T2">. The results confirmed the intended separation. </text:span><text:span text:style-name="T3">Root</text:span><text:span text:style-name="T2"> was blocked from direct directory traversal after permissions were tightened, </text:span><text:span text:style-name="T3">john</text:span><text:span text:style-name="T2"> could access the </text:span><text:span text:style-name="T3">security directory</text:span><text:span text:style-name="T2"> and read </text:span><text:span text:style-name="T3">logs.txt</text:span><text:span text:style-name="T2">, and </text:span><text:span text:style-name="T3">jane</text:span><text:span text:style-name="T2"> could access the </text:span><text:span text:style-name="T3">finance directory</text:span><text:span text:style-name="T2"> and read </text:span><text:span text:style-name="T3">expenditure.txt.</text:span></text:p>
      <text:h text:style-name="P5" text:outline-level="1">5. Results</text:h>
      <text:p text:style-name="P15">• User creation completed successfully for <text:span text:style-name="T8">john</text:span> and <text:span text:style-name="T8">jane</text:span>.</text:p>
      <text:p text:style-name="P15">• The <text:span text:style-name="T8">srv</text:span> folder structure was created and organized by department.</text:p>
      <text:p text:style-name="P15">• Ownership and permission settings restricted each directory to the correct group.</text:p>
      <text:p text:style-name="P15">• ACLs allowed controlled traversal without opening the environment broadly.</text:p>
      <text:p text:style-name="P15">• Access testing proved that the final security model behaved as intended.</text:p>
      <text:h text:style-name="P5" text:outline-level="1">6. Key Takeaways</text:h>
      <text:p text:style-name="P12">This lab is basic on the surface, but it reflects real administrative discipline. Most permission mistakes in Linux come from sloppy group design, weak ownership planning, or giving away too much access too early. The structure here avoids that problem. It separates responsibilities cleanly and proves the setup with live testing.</text:p>
      <text:h text:style-name="P5" text:outline-level="1">7. Conclusion</text:h>
      <text:p text:style-name="P12">The lab was completed successfully and demonstrates the full workflow for Linux access control at a small departmental scale. The final configuration provides the right balance of structure and restriction: users can reach what they need, and nothing more.</text:p>
      <text:p text:style-name="Standard"/>
      <text:h text:style-name="P4" text:outline-level="1">Appendix A. Evidence Log</text:h>
      <text:p text:style-name="P12">Each figure below is presented in chronological order. The captions match the lab sequence and are ready for GitHub publication.</text:p>
      <text:p text:style-name="P13">Figure 1. Creating the user account `john`.</text:p>
      <text:p text:style-name="P2"><draw:frame draw:style-name="fr1" draw:name="Picture 1" text:anchor-type="as-char" svg:width="6.1in" svg:height="3.4299in" draw:z-index="0"><draw:image xlink:href="Pictures/100000010000055600000300EF83606A.png" xlink:type="simple" xlink:show="embed" xlink:actuate="onLoad" draw:mime-type="image/png"/></draw:frame></text:p>
      <text:p text:style-name="P16">Source: ADDUSER JOHN.png</text:p>
      <text:p text:style-name="Standard"/>
      <text:p text:style-name="P14">Figure 2. Creating the user account `jane`.</text:p>
      <text:p text:style-name="P2"><draw:frame draw:style-name="fr1" draw:name="Picture 2" text:anchor-type="as-char" svg:width="6.1in" svg:height="3.4299in" draw:z-index="1"><draw:image xlink:href="Pictures/100000010000055600000300412A6B87.png" xlink:type="simple" xlink:show="embed" xlink:actuate="onLoad" draw:mime-type="image/png"/></draw:frame></text:p>
      <text:p text:style-name="P16">Source: ADDUSER JANE.png</text:p>
      <text:p text:style-name="Standard"/>
      <text:p text:style-name="P14">Figure 3. Building the `/home/willyonazure/srv` structure and departmental files.</text:p>
      <text:p text:style-name="P2"><draw:frame draw:style-name="fr1" draw:name="Picture 3" text:anchor-type="as-char" svg:width="6.1in" svg:height="3.4299in" draw:z-index="2"><draw:image xlink:href="Pictures/100000010000055600000300104289A5.png" xlink:type="simple" xlink:show="embed" xlink:actuate="onLoad" draw:mime-type="image/png"/></draw:frame></text:p>
      <text:p text:style-name="P16">Source: MKDIR SRV AND SUBDIR.png</text:p>
      <text:p text:style-name="Standard"/>
      <text:p text:style-name="P14">Figure 4. Applying ownership, group membership, and directory permissions.</text:p>
      <text:p text:style-name="P2"><draw:frame draw:style-name="fr1" draw:name="Picture 4" text:anchor-type="as-char" svg:width="6.1in" svg:height="3.4299in" draw:z-index="3"><draw:image xlink:href="Pictures/1000000100000556000003000B251624.png" xlink:type="simple" xlink:show="embed" xlink:actuate="onLoad" draw:mime-type="image/png"/></draw:frame></text:p>
      <text:p text:style-name="P16">Source: CHOWN AND CHMOD OF DIR TO GROUPS.png</text:p>
      <text:p text:style-name="Standard"/>
      <text:p text:style-name="P14">Figure 5. Verifying ACL and permission settings on the lab directories.</text:p>
      <text:p text:style-name="P2"><draw:frame draw:style-name="fr1" draw:name="Picture 5" text:anchor-type="as-char" svg:width="6.1in" svg:height="3.4299in" draw:z-index="4"><draw:image xlink:href="Pictures/10000001000005560000030062F53A35.png" xlink:type="simple" xlink:show="embed" xlink:actuate="onLoad" draw:mime-type="image/png"/></draw:frame></text:p>
      <text:p text:style-name="P16">Source: GETFACL ON DIR.png</text:p>
      <text:p text:style-name="Standard"/>
      <text:p text:style-name="P14">Figure 6. Additional ACL verification for `security_directory`.</text:p>
      <text:p text:style-name="P2"><draw:frame draw:style-name="fr1" draw:name="Picture 6" text:anchor-type="as-char" svg:width="6.1in" svg:height="3.4299in" draw:z-index="5"><draw:image xlink:href="Pictures/100000010000055600000300AD613A4F.png" xlink:type="simple" xlink:show="embed" xlink:actuate="onLoad" draw:mime-type="image/png"/></draw:frame></text:p>
      <text:p text:style-name="P16">Source: GETFACL ON SECURITY_DIR.png</text:p>
      <text:p text:style-name="Standard"/>
      <text:p text:style-name="P14"><text:span text:style-name="T4">setgid </text:span>Figure 7. Testing access as root, `john`, and `jane`.</text:p>
      <text:p text:style-name="P2"><draw:frame draw:style-name="fr1" draw:name="Picture 7" text:anchor-type="as-char" svg:width="6.1in" svg:height="3.4299in" draw:z-index="6"><draw:image xlink:href="Pictures/100000010000055600000300DE535A3D.png" xlink:type="simple" xlink:show="embed" xlink:actuate="onLoad" draw:mime-type="image/png"/></draw:frame></text:p>
      <text:p text:style-name="P16">Source: TESTING PERMISSIONS FOR EVERY USER ON EVERY DIR.p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style:font-name="Aptos" fo:font-family="Aptos" style:font-family-generic="roman" style:font-pitch="variable" fo:font-size="10.5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5pt" fo:font-weight="bold" style:font-name-asian="ＭＳ ゴシック" style:font-family-asian="'ＭＳ ゴシック'" style:font-family-generic-asian="system" style:font-pitch-asian="variable" style:font-size-asian="15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5pt" fo:font-weight="bold" style:font-name-asian="ＭＳ ゴシック" style:font-family-asian="'ＭＳ ゴシック'" style:font-family-generic-asian="system" style:font-pitch-asian="variable" style:font-size-asian="12.5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4pt" fo:letter-spacing="0.0035in" fo:font-weight="bold" style:letter-kerning="true" style:font-name-asian="ＭＳ ゴシック" style:font-family-asian="'ＭＳ ゴシック'" style:font-family-generic-asian="system" style:font-pitch-asian="variable" style:font-size-asian="24pt" style:font-weight-asian="bold"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end" style:justify-single-word="false"/>
    </style:style>
    <style:style style:name="MT1" style:family="text">
      <style:text-properties style:font-name="Aptos" fo:font-size="9pt" style:font-size-asian="9pt"/>
    </style:style>
    <style:page-layout style:name="Mpm1">
      <style:page-layout-properties fo:page-width="8.5in" fo:page-height="11in" style:num-format="1" style:print-orientation="portrait" fo:margin-top="0.7in" fo:margin-bottom="0.2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5in" fo:margin-left="0in" fo:margin-right="0in" fo:margin-top="0.41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3</meta:editing-cycles>
    <meta:creation-date>2013-12-23T23:15:00</meta:creation-date>
    <dc:date>2026-06-23T21:54:24.727524203</dc:date>
    <meta:editing-duration>PT3M2S</meta:editing-duration>
    <meta:generator>LibreOffice/24.2.7.2$Linux_X86_64 LibreOffice_project/420$Build-2</meta:generator>
    <meta:document-statistic meta:table-count="2" meta:image-count="7" meta:object-count="0" meta:page-count="10" meta:paragraph-count="77" meta:word-count="702" meta:character-count="4724" meta:non-whitespace-character-count="4092"/>
    <meta:user-defined meta:name="AppVersion">14.0000</meta:user-defined>
    <meta:template xlink:type="simple" xlink:actuate="onRequest" xlink:title="Normal.dotm" xlink:href=""/>
  </office:meta>
</office:document-meta>
</file>